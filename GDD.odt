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-W9500" svg:font-family="Ari-W9500" style:font-pitch="variable"/>
    <style:font-face style:name="Ari-W9500 Bold" svg:font-family="'Ari-W9500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997cm" style:rel-column-width="2835*"/>
    </style:style>
    <style:style style:name="Table1.B" style:family="table-column">
      <style:table-column-properties style:column-width="6.327cm" style:rel-column-width="3590*"/>
    </style:style>
    <style:style style:name="Table1.C" style:family="table-column">
      <style:table-column-properties style:column-width="5.676cm" style:rel-column-width="322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4*"/>
    </style:style>
    <style:style style:name="Table2.B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415cm" style:rel-column-width="2505*"/>
    </style:style>
    <style:style style:name="Table3.B" style:family="table-column">
      <style:table-column-properties style:column-width="8.629cm" style:rel-column-width="4896*"/>
    </style:style>
    <style:style style:name="Table3.C" style:family="table-column">
      <style:table-column-properties style:column-width="3.955cm" style:rel-column-width="224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-W9500 Bold" fo:font-size="22pt" fo:language="en" fo:country="US" fo:font-weight="bold" officeooo:rsid="000eec94" officeooo:paragraph-rsid="000eec9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-W9500 Bold" fo:font-size="22pt" fo:language="en" fo:country="US" officeooo:rsid="000eec94" officeooo:paragraph-rsid="000eec94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Ari-W9500 Bold" fo:font-size="22pt" fo:language="en" fo:country="US" fo:font-weight="bold" officeooo:rsid="000eec94" officeooo:paragraph-rsid="00104510" style:font-size-asian="22pt" style:font-weight-asian="bold" style:font-size-complex="22pt" style:font-weight-complex="bold"/>
    </style:style>
    <style:style style:name="P4" style:family="paragraph" style:parent-style-name="Standard">
      <style:paragraph-properties fo:break-before="page"/>
      <style:text-properties style:font-name="Ari-W9500 Bold" fo:font-size="18pt" fo:language="en" fo:country="US" officeooo:rsid="000eec94" officeooo:paragraph-rsid="000eec94" style:font-size-asian="18pt" style:font-size-complex="18pt"/>
    </style:style>
    <style:style style:name="P5" style:family="paragraph" style:parent-style-name="Table_20_Contents">
      <style:text-properties style:font-name="Ari-W9500 Bold" fo:font-size="16pt" fo:language="en" fo:country="US" officeooo:rsid="0013cd1f" officeooo:paragraph-rsid="0013cd1f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-W9500" fo:font-size="16pt" fo:language="en" fo:country="US" officeooo:rsid="00104510" officeooo:paragraph-rsid="00104510" style:font-size-asian="16pt" style:font-size-complex="16pt"/>
    </style:style>
    <style:style style:name="P7" style:family="paragraph" style:parent-style-name="Table_20_Contents" style:list-style-name="L1">
      <style:text-properties style:font-name="Ari-W9500" fo:font-size="13pt" fo:language="en" fo:country="US" officeooo:rsid="00104510" officeooo:paragraph-rsid="0025327f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Ari-W9500" fo:font-size="16pt" fo:language="en" fo:country="US" officeooo:rsid="0013cd1f" officeooo:paragraph-rsid="0013cd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-W9500" fo:font-size="16pt" fo:language="pt" fo:country="BR" officeooo:rsid="0020d362" officeooo:paragraph-rsid="0020d362" style:font-size-asian="16pt" style:font-size-complex="16pt"/>
    </style:style>
    <style:style style:name="P10" style:family="paragraph" style:parent-style-name="Table_20_Contents" style:list-style-name="L2">
      <style:text-properties style:font-name="Ari-W9500" fo:font-size="13pt" fo:language="en" fo:country="US" officeooo:rsid="0020d362" officeooo:paragraph-rsid="0021d2ad" style:font-size-asian="13pt" style:font-size-complex="13pt"/>
    </style:style>
    <style:style style:name="P11" style:family="paragraph" style:parent-style-name="Table_20_Contents" style:list-style-name="L2">
      <style:text-properties style:font-name="Ari-W9500" fo:font-size="13pt" fo:language="en" fo:country="US" officeooo:rsid="0021d2ad" officeooo:paragraph-rsid="0021d2ad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Ari-W9500" fo:font-size="16pt" fo:language="en" fo:country="US" style:font-size-asian="16pt" style:font-size-complex="16pt"/>
    </style:style>
    <style:style style:name="P13" style:family="paragraph" style:parent-style-name="Table_20_Contents">
      <style:text-properties style:font-name="Ari-W9500" fo:font-size="13pt" fo:language="en" fo:country="US" style:font-size-asian="13pt" style:font-size-complex="13pt"/>
    </style:style>
    <style:style style:name="P14" style:family="paragraph" style:parent-style-name="Standard">
      <style:text-properties style:font-name="Ari-W9500" fo:language="en" fo:country="US" officeooo:rsid="000eec94" officeooo:paragraph-rsid="000eec94"/>
    </style:style>
    <style:style style:name="P15" style:family="paragraph" style:parent-style-name="Standard">
      <style:paragraph-properties fo:break-before="page"/>
      <style:text-properties style:font-name="Ari-W9500 Bold" fo:font-size="18pt" fo:language="en" fo:country="US" officeooo:rsid="002389b9" officeooo:paragraph-rsid="002389b9" style:font-size-asian="18pt" style:font-size-complex="18pt"/>
    </style:style>
    <style:style style:name="P16" style:family="paragraph" style:parent-style-name="Standard">
      <style:text-properties style:font-name="Ari-W9500 Bold" fo:font-size="18pt" fo:language="en" fo:country="US" officeooo:rsid="002389b9" officeooo:paragraph-rsid="002389b9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font-name="Ari-W9500" fo:font-size="18pt" fo:language="en" fo:country="US" fo:font-weight="bold" officeooo:rsid="0025327f" officeooo:paragraph-rsid="0025327f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-W9500" fo:font-size="18pt" fo:language="pt" fo:country="BR" fo:font-weight="bold" officeooo:rsid="0025327f" officeooo:paragraph-rsid="0025327f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-W9500" fo:font-size="18pt" fo:language="en" fo:country="US" fo:font-weight="bold" officeooo:rsid="00249479" officeooo:paragraph-rsid="00249479" style:font-size-asian="18pt" style:font-weight-asian="bold" style:font-size-complex="18pt" style:font-weight-complex="bold"/>
    </style:style>
    <style:style style:name="P20" style:family="paragraph" style:parent-style-name="Table_20_Contents">
      <style:text-properties style:font-name="Ari-W9500" fo:font-size="18pt" style:font-size-asian="18pt" style:font-size-complex="18pt"/>
    </style:style>
    <style:style style:name="P21" style:family="paragraph" style:parent-style-name="Standard">
      <style:paragraph-properties fo:break-before="page"/>
      <style:text-properties style:font-name="Ari-W9500 Bold" fo:font-size="18pt" fo:language="en" fo:country="US" officeooo:rsid="00115e2d" officeooo:paragraph-rsid="00115e2d" style:font-size-asian="18pt" style:font-size-complex="18pt"/>
    </style:style>
    <style:style style:name="P22" style:family="paragraph" style:parent-style-name="Standard">
      <style:text-properties style:font-name="Ari-W9500 Bold" fo:font-size="16pt" fo:language="en" fo:country="US" officeooo:rsid="00115e2d" officeooo:paragraph-rsid="00115e2d" style:font-size-asian="14pt" style:font-size-complex="16pt"/>
    </style:style>
    <style:style style:name="P23" style:family="paragraph" style:parent-style-name="Standard">
      <style:text-properties style:font-name="Ari-W9500" fo:font-size="16pt" fo:language="en" fo:country="US" officeooo:rsid="00115e2d" officeooo:paragraph-rsid="00115e2d" style:font-size-asian="14pt" style:font-size-complex="16pt"/>
    </style:style>
    <style:style style:name="P24" style:family="paragraph" style:parent-style-name="Standard">
      <style:text-properties style:font-name="Ari-W9500 Bold" fo:font-size="16pt" fo:language="en" fo:country="US" officeooo:rsid="00115e2d" officeooo:paragraph-rsid="0013cd1f" style:font-size-asian="14pt" style:font-size-complex="16pt"/>
    </style:style>
    <style:style style:name="P25" style:family="paragraph" style:parent-style-name="Standard" style:list-style-name="L3">
      <style:text-properties style:font-name="Ari-W9500" fo:font-size="16pt" fo:language="en" fo:country="US" officeooo:rsid="00115e2d" officeooo:paragraph-rsid="0013cd1f" style:font-size-asian="14pt" style:font-size-complex="16pt"/>
    </style:style>
    <style:style style:name="P26" style:family="paragraph" style:parent-style-name="Standard" style:list-style-name="L3">
      <style:text-properties style:font-name="Ari-W9500" fo:font-size="16pt" fo:language="en" fo:country="US" officeooo:rsid="0013e0d5" officeooo:paragraph-rsid="0013e0d5" style:font-size-asian="14pt" style:font-size-complex="16pt"/>
    </style:style>
    <style:style style:name="P27" style:family="paragraph" style:parent-style-name="Standard" style:list-style-name="L3">
      <style:text-properties style:font-name="Ari-W9500" fo:font-size="16pt" fo:language="pt" fo:country="BR" officeooo:rsid="002b99ba" officeooo:paragraph-rsid="002b99ba" style:font-size-asian="14pt" style:font-size-complex="16pt"/>
    </style:style>
    <style:style style:name="P28" style:family="paragraph" style:parent-style-name="Standard">
      <style:text-properties style:font-name="Ari-W9500" fo:font-size="16pt" fo:language="en" fo:country="US" fo:font-weight="bold" officeooo:rsid="00115e2d" officeooo:paragraph-rsid="0018b7be" style:font-size-asian="14pt" style:font-weight-asian="bold" style:font-size-complex="16pt" style:font-weight-complex="bold"/>
    </style:style>
    <style:style style:name="P29" style:family="paragraph" style:parent-style-name="Standard">
      <style:text-properties style:font-name="Ari-W9500" fo:font-size="16pt" fo:language="en" fo:country="US" officeooo:rsid="00115e2d" officeooo:paragraph-rsid="0018b7be" style:font-size-asian="14pt" style:font-size-complex="16pt"/>
    </style:style>
    <style:style style:name="P30" style:family="paragraph" style:parent-style-name="Standard">
      <style:text-properties style:font-name="Ari-W9500" fo:font-size="16pt" fo:language="en" fo:country="US" officeooo:rsid="00115e2d" officeooo:paragraph-rsid="00191954" style:font-size-asian="14pt" style:font-size-complex="16pt"/>
    </style:style>
    <style:style style:name="P31" style:family="paragraph" style:parent-style-name="Standard">
      <style:text-properties style:font-name="Ari-W9500" fo:font-size="16pt" fo:language="en" fo:country="US" officeooo:rsid="00115e2d" officeooo:paragraph-rsid="001b61fb" style:font-size-asian="14pt" style:font-size-complex="16pt"/>
    </style:style>
    <style:style style:name="P32" style:family="paragraph" style:parent-style-name="Standard">
      <style:text-properties style:font-name="Ari-W9500" fo:font-size="16pt" fo:language="en" fo:country="US" officeooo:rsid="00115e2d" officeooo:paragraph-rsid="001986c5" style:font-size-asian="14pt" style:font-size-complex="16pt"/>
    </style:style>
    <style:style style:name="P33" style:family="paragraph" style:parent-style-name="Standard">
      <style:text-properties style:font-name="Ari-W9500" fo:font-size="16pt" fo:language="en" fo:country="US" officeooo:rsid="001b61fb" officeooo:paragraph-rsid="001b61fb" style:font-size-asian="14pt" style:font-size-complex="16pt"/>
    </style:style>
    <style:style style:name="P34" style:family="paragraph" style:parent-style-name="Standard">
      <style:text-properties style:font-name="Ari-W9500 Bold" fo:font-size="16pt" fo:language="en" fo:country="US" officeooo:rsid="00115e2d" officeooo:paragraph-rsid="0025327f" style:font-size-asian="14pt" style:font-size-complex="16pt"/>
    </style:style>
    <style:style style:name="P35" style:family="paragraph" style:parent-style-name="Standard">
      <style:text-properties style:font-name="Ari-W9500 Bold" fo:font-size="16pt" fo:language="pt" fo:country="BR" officeooo:rsid="0025327f" officeooo:paragraph-rsid="0025327f" style:font-size-asian="14pt" style:font-size-complex="16pt"/>
    </style:style>
    <style:style style:name="P36" style:family="paragraph" style:parent-style-name="Standard">
      <style:text-properties style:font-name="Ari-W9500" fo:font-size="16pt" fo:language="pt" fo:country="BR" officeooo:rsid="0025327f" officeooo:paragraph-rsid="0025327f" style:font-size-asian="14pt" style:font-size-complex="16pt"/>
    </style:style>
    <style:style style:name="P37" style:family="paragraph" style:parent-style-name="Standard" style:list-style-name="L4">
      <style:text-properties style:font-name="Ari-W9500" fo:font-size="16pt" fo:language="pt" fo:country="BR" officeooo:rsid="0027ec73" officeooo:paragraph-rsid="0027ec73" style:font-size-asian="14pt" style:font-size-complex="16pt"/>
    </style:style>
    <style:style style:name="P38" style:family="paragraph" style:parent-style-name="Table_20_Contents" style:list-style-name="L4">
      <style:text-properties style:font-name="Ari-W9500" fo:font-size="16pt" officeooo:rsid="0028ef33" officeooo:paragraph-rsid="0028ef33" style:font-size-asian="14pt" style:font-size-complex="16pt"/>
    </style:style>
    <style:style style:name="P39" style:family="paragraph" style:parent-style-name="Table_20_Contents">
      <style:text-properties style:font-name="Ari-W9500" fo:font-size="16pt" officeooo:rsid="0028ef33" officeooo:paragraph-rsid="0028ef33" style:font-size-asian="14pt" style:font-size-complex="16pt"/>
    </style:style>
    <style:style style:name="P40" style:family="paragraph" style:parent-style-name="Table_20_Contents" style:list-style-name="L5">
      <style:text-properties style:font-name="Ari-W9500" fo:font-size="16pt" officeooo:rsid="0028ef33" officeooo:paragraph-rsid="002adb6e" style:font-size-asian="14pt" style:font-size-complex="16pt"/>
    </style:style>
    <style:style style:name="P41" style:family="paragraph" style:parent-style-name="Table_20_Contents">
      <style:text-properties style:font-name="Ari-W9500" fo:font-size="16pt" officeooo:rsid="002adb6e" officeooo:paragraph-rsid="002adb6e" style:font-size-asian="14pt" style:font-size-complex="16pt"/>
    </style:style>
    <style:style style:name="P42" style:family="paragraph" style:parent-style-name="Table_20_Contents" style:list-style-name="L6">
      <style:text-properties style:font-name="Ari-W9500" fo:font-size="16pt" officeooo:rsid="002adb6e" officeooo:paragraph-rsid="002adb6e" style:font-size-asian="14pt" style:font-size-complex="16pt"/>
    </style:style>
    <style:style style:name="P43" style:family="paragraph" style:parent-style-name="Table_20_Contents">
      <style:text-properties style:font-name="Ari-W9500" fo:font-size="16pt" officeooo:rsid="0028ef33" officeooo:paragraph-rsid="002adb6e" style:font-size-asian="14pt" style:font-size-complex="16pt"/>
    </style:style>
    <style:style style:name="P44" style:family="paragraph" style:parent-style-name="Table_20_Contents">
      <style:paragraph-properties fo:break-before="page"/>
      <style:text-properties style:font-name="Ari-W9500" fo:font-size="16pt" officeooo:rsid="0028ef33" officeooo:paragraph-rsid="002adb6e" style:font-size-asian="14pt" style:font-size-complex="16pt"/>
    </style:style>
    <style:style style:name="P45" style:family="paragraph" style:parent-style-name="Standard">
      <style:text-properties style:font-name="Ari-W9500" fo:font-size="16pt" fo:language="pt" fo:country="BR" officeooo:rsid="0027ec73" officeooo:paragraph-rsid="0027ec73" style:font-size-asian="14pt" style:font-size-complex="16pt"/>
    </style:style>
    <style:style style:name="P46" style:family="paragraph" style:parent-style-name="Standard">
      <style:text-properties style:font-name="Ari-W9500 Bold" fo:font-size="16pt" fo:language="pt" fo:country="BR" officeooo:rsid="0027ec73" officeooo:paragraph-rsid="0027ec73" style:font-size-asian="14pt" style:font-size-complex="16pt"/>
    </style:style>
    <style:style style:name="P47" style:family="paragraph" style:parent-style-name="Standard">
      <style:text-properties style:font-name="Ari-W9500 Bold" fo:font-size="16pt" fo:language="en" fo:country="US" officeooo:rsid="00115e2d" officeooo:paragraph-rsid="001b61fb" style:font-size-asian="14pt" style:font-size-complex="16pt"/>
    </style:style>
    <style:style style:name="P48" style:family="paragraph" style:parent-style-name="Standard">
      <style:text-properties style:font-name="Ari-W9500" fo:font-size="16pt" fo:language="en" fo:country="US" officeooo:rsid="00115e2d" officeooo:paragraph-rsid="001cee3a" style:font-size-asian="14pt" style:font-size-complex="16pt"/>
    </style:style>
    <style:style style:name="P49" style:family="paragraph" style:parent-style-name="Standard">
      <style:text-properties style:font-name="Ari-W9500" fo:font-size="16pt" fo:language="en" fo:country="US" officeooo:rsid="00115e2d" officeooo:paragraph-rsid="001e651f" style:font-size-asian="14pt" style:font-size-complex="16pt"/>
    </style:style>
    <style:style style:name="P50" style:family="paragraph" style:parent-style-name="Standard">
      <style:text-properties style:font-name="Ari-W9500" fo:font-size="16pt" fo:language="pt" fo:country="BR" officeooo:rsid="001e651f" officeooo:paragraph-rsid="001e651f" style:font-size-asian="14pt" style:font-size-complex="16pt"/>
    </style:style>
    <style:style style:name="P51" style:family="paragraph" style:parent-style-name="Standard">
      <style:text-properties style:font-name="Ari-W9500" fo:font-size="16pt" fo:language="pt" fo:country="BR" officeooo:rsid="001f4ef5" officeooo:paragraph-rsid="001f4ef5" style:font-size-asian="14pt" style:font-size-complex="16pt"/>
    </style:style>
    <style:style style:name="T1" style:family="text">
      <style:text-properties fo:language="pt" fo:country="BR" officeooo:rsid="001fb317"/>
    </style:style>
    <style:style style:name="T2" style:family="text">
      <style:text-properties fo:language="pt" fo:country="BR" officeooo:rsid="0020d362"/>
    </style:style>
    <style:style style:name="T3" style:family="text">
      <style:text-properties officeooo:rsid="0013cd1f"/>
    </style:style>
    <style:style style:name="T4" style:family="text">
      <style:text-properties officeooo:rsid="0018b7be"/>
    </style:style>
    <style:style style:name="T5" style:family="text">
      <style:text-properties officeooo:rsid="0025327f"/>
    </style:style>
    <style:style style:name="T6" style:family="text">
      <style:text-properties officeooo:rsid="0021af60"/>
    </style:style>
    <style:style style:name="T7" style:family="text">
      <style:text-properties style:font-name="Ari-W9500 Bold"/>
    </style:style>
    <style:style style:name="T8" style:family="text">
      <style:text-properties fo:color="#81d41a" loext:opacity="100%" fo:font-weight="bold" officeooo:rsid="0013cd1f" style:font-weight-asian="bold" style:font-weight-complex="bold"/>
    </style:style>
    <style:style style:name="T9" style:family="text">
      <style:text-properties fo:color="#81d41a" loext:opacity="100%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1d41a" loext:opacity="100%"/>
    </style:style>
    <style:style style:name="T12" style:family="text">
      <style:text-properties officeooo:rsid="0013e0d5"/>
    </style:style>
    <style:style style:name="T13" style:family="text">
      <style:text-properties fo:language="pt" fo:country="BR" officeooo:rsid="0025327f"/>
    </style:style>
    <style:style style:name="T14" style:family="text">
      <style:text-properties fo:font-weight="bold" officeooo:rsid="0018b7be" style:font-weight-asian="bold" style:font-weight-complex="bold"/>
    </style:style>
    <style:style style:name="T15" style:family="text">
      <style:text-properties officeooo:rsid="00191954"/>
    </style:style>
    <style:style style:name="T16" style:family="text">
      <style:text-properties officeooo:rsid="001986c5"/>
    </style:style>
    <style:style style:name="T17" style:family="text">
      <style:text-properties fo:language="pt" fo:country="BR" officeooo:rsid="002adb6e"/>
    </style:style>
    <style:style style:name="T18" style:family="text">
      <style:text-properties officeooo:rsid="001b61fb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01b61fb"/>
    </style:style>
    <style:style style:name="T21" style:family="text">
      <style:text-properties officeooo:rsid="0026af00"/>
    </style:style>
    <style:style style:name="T22" style:family="text">
      <style:text-properties officeooo:rsid="0027ec73"/>
    </style:style>
    <style:style style:name="T23" style:family="text">
      <style:text-properties officeooo:rsid="0028ef33"/>
    </style:style>
    <style:style style:name="T24" style:family="text">
      <style:text-properties officeooo:rsid="002adb6e"/>
    </style:style>
    <style:style style:name="T25" style:family="text">
      <style:text-properties fo:language="pt" fo:country="BR" officeooo:rsid="001cee3a"/>
    </style:style>
    <style:style style:name="T26" style:family="text">
      <style:text-properties style:font-name="Ari-W9500 Bold" fo:language="pt" fo:country="BR" officeooo:rsid="001e651f"/>
    </style:style>
    <style:style style:name="T27" style:family="text">
      <style:text-properties fo:language="pt" fo:country="BR" officeooo:rsid="001e65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Design Document</text:p>
      <text:p text:style-name="P1">Outer OPS DEMO</text:p>
      <text:p text:style-name="P1">v1.<text:span text:style-name="T1">2</text:span>.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Noro</text:p>
      <text:p text:style-name="P1">06/2025</text:p>
      <text:p text:style-name="P4">Version Control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ersion Number</text:p>
          </table:table-cell>
          <table:table-cell table:style-name="Table1.A1" office:value-type="string">
            <text:p text:style-name="P5">Info</text:p>
          </table:table-cell>
          <table:table-cell table:style-name="Table1.C1" office:value-type="string">
            <text:p text:style-name="P5">Date</text:p>
          </table:table-cell>
        </table:table-row>
        <table:table-row>
          <table:table-cell table:style-name="Table1.A2" office:value-type="string">
            <text:p text:style-name="P6">V1.<text:span text:style-name="T2">1</text:span>.0</text:p>
          </table:table-cell>
          <table:table-cell table:style-name="Table1.A2" office:value-type="string">
            <text:list text:style-name="L1">
              <text:list-item>
                <text:p text:style-name="P7">Ini<text:span text:style-name="T3">tial version, first thoughts </text:span><text:span text:style-name="T4">and concepts put on this document</text:span><text:span text:style-name="T5">; </text:span></text:p>
              </text:list-item>
              <text:list-item>
                <text:p text:style-name="P7"><text:span text:style-name="T5">Si</text:span><text:span text:style-name="T3">mplest mockup in GODOT </text:span><text:span text:style-name="T4">developed</text:span></text:p>
              </text:list-item>
            </text:list>
          </table:table-cell>
          <table:table-cell table:style-name="Table1.C2" office:value-type="string">
            <text:p text:style-name="P8">26 – 06 – 2025 </text:p>
          </table:table-cell>
        </table:table-row>
        <table:table-row>
          <table:table-cell table:style-name="Table1.A2" office:value-type="string">
            <text:p text:style-name="P9">V1.2.0</text:p>
          </table:table-cell>
          <table:table-cell table:style-name="Table1.A2" office:value-type="string">
            <text:list text:style-name="L2">
              <text:list-item>
                <text:p text:style-name="P10">Sending first, bare bare bare bones GODOT script;</text:p>
              </text:list-item>
              <text:list-item>
                <text:p text:style-name="P10">first interface <text:span text:style-name="T6">sketches after recovering Penpot drafts from 2022;</text:span></text:p>
              </text:list-item>
              <text:list-item>
                <text:p text:style-name="P11">Polishing a bit of the GDD, <text:span text:style-name="T5">creating a Modules Overview and Breakdown in section 2 </text:span></text:p>
              </text:list-item>
            </text:list>
          </table:table-cell>
          <table:table-cell table:style-name="Table1.C2" office:value-type="string">
            <text:p text:style-name="P9">27 – 06 – 2025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2"/>
          </table:table-cell>
        </table:table-row>
      </table:table>
      <text:p text:style-name="P14"/>
      <text:p text:style-name="P14"/>
      <text:p text:style-name="P14"/>
      <text:p text:style-name="P15">Current Development Objectives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17">Task</text:p>
          </table:table-cell>
          <table:table-cell table:style-name="Table2.A1" office:value-type="string">
            <text:p text:style-name="P18">Module</text:p>
          </table:table-cell>
          <table:table-cell table:style-name="Table2.A1" office:value-type="string">
            <text:p text:style-name="P19">Short Description</text:p>
          </table:table-cell>
          <table:table-cell table:style-name="Table2.D1" office:value-type="string">
            <text:p text:style-name="P19">Status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P16"/>
      <text:p text:style-name="P21">Overview</text:p>
      <text:p text:style-name="P22"/>
      <text:p text:style-name="P23"><text:span text:style-name="T3">Outer OPS (temporary title) is a</text:span> tactical stealth-action game inspired by <text:span text:style-name="T7">*Metal Gear Solid: Peace Walker* </text:span><text:span text:style-name="T3">OUTER OPS segment</text:span>, combining <text:span text:style-name="T3">varied </text:span><text:span text:style-name="T8">auto-battle</text:span><text:span text:style-name="T9"> missions</text:span><text:span text:style-name="T10"> </text:span>and a <text:span text:style-name="T9">meta-management system</text:span> involving a <text:span text:style-name="T9">customizable Mother Base</text:span>. Players will<text:span text:style-name="T11"> </text:span><text:span text:style-name="T9">capture and recruit enemies, develop weapons, assign staff, and launch Outer Ops combat deployments</text:span><text:span text:style-name="T10">. </text:span></text:p>
      <text:p text:style-name="P23"/>
      <text:p text:style-name="P23"/>
      <text:p text:style-name="P24">## 1. Core Game Loop </text:p>
      <text:list text:style-name="L3">
        <text:list-item>
          <text:p text:style-name="P25">Choose/Develop Equipment / <text:span text:style-name="T3">Assign Staff / Recruit </text:span><text:span text:style-name="T12">Troops</text:span></text:p>
        </text:list-item>
        <text:list-item>
          <text:p text:style-name="P25">Select <text:span text:style-name="T12">Campaign → Mission</text:span></text:p>
        </text:list-item>
        <text:list-item>
          <text:p text:style-name="P25">Complete Mission</text:p>
        </text:list-item>
        <text:list-item>
          <text:p text:style-name="P26">Gain Resources / Staff / Intel</text:p>
        </text:list-item>
        <text:list-item>
          <text:p text:style-name="P27">Do changes according to Mission results</text:p>
        </text:list-item>
        <text:list-item>
          <text:p text:style-name="P27">Complete missions until Campaign is over</text:p>
        </text:list-item>
        <text:list-item>
          <text:p text:style-name="P25">Assign new staff to base departments</text:p>
        </text:list-item>
        <text:list-item>
          <text:p text:style-name="P25">Develop new gear or send staff to Outer Ops</text:p>
        </text:list-item>
        <text:list-item>
          <text:p text:style-name="P25"><text:s/>Repeat </text:p>
        </text:list-item>
      </text:list>
      <text:p text:style-name="P23"/>
      <text:p text:style-name="P22">## 2.<text:span text:style-name="T13">1</text:span> Modules <text:span text:style-name="T13">Overview</text:span> </text:p>
      <text:p text:style-name="P22"/>
      <text:p text:style-name="P28">### <text:span text:style-name="T4">A</text:span>. Mother Base Management </text:p>
      <text:p text:style-name="P29">- Base view: departments like R&amp;D, Mess Hall, Intel, etc.</text:p>
      <text:p text:style-name="P29">- Staff stat system (Combat, Intel, Tech, Medical, Morale)</text:p>
      <text:p text:style-name="P29">- Staff assignment interface</text:p>
      <text:p text:style-name="P29">- Time-based <text:span text:style-name="T4">and </text:span>or trigger-based gear development</text:p>
      <text:p text:style-name="P29">- GMP and resource currency</text:p>
      <text:p text:style-name="P29"/>
      <text:p text:style-name="P30"><text:span text:style-name="T10">### </text:span><text:span text:style-name="T14">B</text:span><text:span text:style-name="T10">. Outer Ops (Auto-Battler)</text:span> </text:p>
      <text:p text:style-name="P30">- <text:span text:style-name="T15">Choose Campaign that you want to partake (or continue)</text:span></text:p>
      <text:p text:style-name="P30">- Deploy staff teams to missions</text:p>
      <text:p text:style-name="P30">- Enemy force preview with difficulty rating</text:p>
      <text:p text:style-name="P31">- Auto-simulated battle using stats + RNG</text:p>
      <text:p text:style-name="P31"><text:soft-page-break/>- Soldier outcomes (promotion, injury, death)</text:p>
      <text:p text:style-name="P30">- Loot and rewards system</text:p>
      <text:p text:style-name="P30">- <text:span text:style-name="T15">Retreat or proceed after battle</text:span></text:p>
      <text:p text:style-name="P30"/>
      <text:p text:style-name="P32">### <text:span text:style-name="T16">C</text:span>. Progression </text:p>
      <text:p text:style-name="P32">- Soldier recruitment</text:p>
      <text:p text:style-name="P32">- Base expansion (leveling up departments)</text:p>
      <text:p text:style-name="P32">- Unlock new missions</text:p>
      <text:p text:style-name="P32">- Blueprint system for gear</text:p>
      <text:p text:style-name="P32"/>
      <text:p text:style-name="P31">### <text:span text:style-name="T16">D</text:span>. UI and Menus </text:p>
      <text:p text:style-name="P31">- Main menu with <text:span text:style-name="T17">Campaign</text:span>/Base <text:span text:style-name="T17">Management</text:span></text:p>
      <text:p text:style-name="P31">- <text:span text:style-name="T18">Campaign</text:span> selection with objective preview <text:span text:style-name="T18">( Campaign → Mission)</text:span></text:p>
      <text:p text:style-name="P33">- Mission menu with current objective and management options</text:p>
      <text:p text:style-name="P33">- R&amp;D menu with Weapons / Items / <text:span text:style-name="T19">Mechs</text:span></text:p>
      <text:p text:style-name="P33">- <text:span text:style-name="T19">Recruitment Menu</text:span></text:p>
      <text:p text:style-name="P31">- Staff list and sorting</text:p>
      <text:p text:style-name="P31">- Equipment loadout screen</text:p>
      <text:p text:style-name="P31">- <text:span text:style-name="T20">Battle Interface (Combat / Stealth )</text:span></text:p>
      <text:p text:style-name="P31">- Mission result screen (rank, rewards)</text:p>
      <text:p text:style-name="P31"/>
      <text:p text:style-name="P34">## 2.<text:span text:style-name="T13">1</text:span> Modules <text:span text:style-name="T13">Breakdown</text:span></text:p>
      <text:p text:style-name="P35"/>
      <text:p text:style-name="P36"># 2.1.A <text:span text:style-name="T21">Mother Base – </text:span><text:span text:style-name="T22">Staff Assignment (</text:span><text:span text:style-name="T23">MBM.</text:span><text:span text:style-name="T22">STAFF)</text:span></text:p>
      <text:list text:style-name="L4">
        <text:list-item>
          <text:p text:style-name="P37">Staff Stat <text:span text:style-name="T23">S</text:span>ystem</text:p>
        </text:list-item>
        <text:list-item>
          <text:p text:style-name="P38">Staff Assignment Interface</text:p>
        </text:list-item>
      </text:list>
      <text:p text:style-name="P39"># 2.1.B Mother Base – Economy and R&amp;D (MBM.ERD)</text:p>
      <text:list text:style-name="L5">
        <text:list-item>
          <text:p text:style-name="P40">Time/Trigger-based Development</text:p>
        </text:list-item>
        <text:list-item>
          <text:p text:style-name="P40">GMP/Resource currency</text:p>
        </text:list-item>
      </text:list>
      <text:p text:style-name="P41">#.21.C Mother Base – Base View</text:p>
      <text:list text:style-name="L6">
        <text:list-item>
          <text:p text:style-name="P42">View Departments</text:p>
        </text:list-item>
      </text:list>
      <text:p text:style-name="P43"/>
      <text:p text:style-name="P43"/>
      <text:p text:style-name="P44"/>
      <text:p text:style-name="P45"/>
      <text:p text:style-name="P46">## 2.2 Modules – <text:span text:style-name="T23">Features </text:span>Priorities</text:p>
      <text:p text:style-name="P45">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9">Parent</text:p>
          </table:table-cell>
          <table:table-cell table:style-name="Table3.A1" office:value-type="string">
            <text:p text:style-name="P39">Name</text:p>
          </table:table-cell>
          <table:table-cell table:style-name="Table3.C1" office:value-type="string">
            <text:p text:style-name="P39">Priority</text:p>
          </table:table-cell>
        </table:table-row>
        <table:table-row>
          <table:table-cell table:style-name="Table3.A2" office:value-type="string">
            <text:p text:style-name="P39">MBM.STAFF<text:span text:style-name="T24">01</text:span></text:p>
          </table:table-cell>
          <table:table-cell table:style-name="Table3.A2" office:value-type="string">
            <text:p text:style-name="P39">Staff Stat System</text:p>
          </table:table-cell>
          <table:table-cell table:style-name="Table3.C2" office:value-type="string">
            <text:p text:style-name="P39">Must Have</text:p>
          </table:table-cell>
        </table:table-row>
        <table:table-row>
          <table:table-cell table:style-name="Table3.A2" office:value-type="string">
            <text:p text:style-name="P39">MBM.STAFF<text:span text:style-name="T24">02</text:span></text:p>
          </table:table-cell>
          <table:table-cell table:style-name="Table3.A2" office:value-type="string">
            <text:p text:style-name="P39">Staff Assignment Interface</text:p>
          </table:table-cell>
          <table:table-cell table:style-name="Table3.C2" office:value-type="string">
            <text:p text:style-name="P39">Must Have</text:p>
          </table:table-cell>
        </table:table-row>
        <table:table-row>
          <table:table-cell table:style-name="Table3.A2" office:value-type="string">
            <text:p text:style-name="P41">MBM.ERD01</text:p>
          </table:table-cell>
          <table:table-cell table:style-name="Table3.A2" office:value-type="string">
            <text:p text:style-name="P39">Time/Trigger-based Development</text:p>
          </table:table-cell>
          <table:table-cell table:style-name="Table3.C2" office:value-type="string">
            <text:p text:style-name="P39">Must Have</text:p>
          </table:table-cell>
        </table:table-row>
        <table:table-row>
          <table:table-cell table:style-name="Table3.A2" office:value-type="string">
            <text:p text:style-name="P41">MBM.ERD02</text:p>
          </table:table-cell>
          <table:table-cell table:style-name="Table3.A2" office:value-type="string">
            <text:p text:style-name="P39">GMP/Resource currency</text:p>
          </table:table-cell>
          <table:table-cell table:style-name="Table3.C2" office:value-type="string">
            <text:p text:style-name="P39">Must Have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9">Should Have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9">Nice to Have</text:p>
          </table:table-cell>
        </table:table-row>
      </table:table>
      <text:p text:style-name="P45"/>
      <text:p text:style-name="P45"/>
      <text:p text:style-name="P31"/>
      <text:p text:style-name="P47">## 3. Data Models (simplified) </text:p>
      <text:p text:style-name="P47"/>
      <text:p text:style-name="P31">### <text:span text:style-name="T11">Soldier</text:span> </text:p>
      <text:p text:style-name="P48">- ID, name, stats (combat, tech, etc.)</text:p>
      <text:p text:style-name="P48">- Condition (healthy, injured, dead)</text:p>
      <text:p text:style-name="P48">- Department assignment</text:p>
      <text:p text:style-name="P48">- Experience/Rank</text:p>
      <text:p text:style-name="P48"/>
      <text:p text:style-name="P48">### <text:span text:style-name="T25">Campaign</text:span></text:p>
      <text:p text:style-name="P48">- ID, name, map, objective</text:p>
      <text:p text:style-name="P48">- Enemy stats, patrols</text:p>
      <text:p text:style-name="P48">- Rewards</text:p>
      <text:p text:style-name="P48">- Rank calculation formula</text:p>
      <text:p text:style-name="P48"/>
      <text:p text:style-name="P48"><text:soft-page-break/>### Outer Ops Mission </text:p>
      <text:p text:style-name="P48">- ID, enemy force stats</text:p>
      <text:p text:style-name="P48">- Estimated difficulty</text:p>
      <text:p text:style-name="P48">- Rewards table</text:p>
      <text:p text:style-name="P48">- Duration (for delayed simulation)</text:p>
      <text:p text:style-name="P48"/>
      <text:p text:style-name="P49"><text:span text:style-name="T7">## </text:span><text:span text:style-name="T26">4</text:span><text:span text:style-name="T7">. Prototype Roadmap</text:span> </text:p>
      <text:p text:style-name="P49"/>
      <text:p text:style-name="P49">### Phase 1: <text:span text:style-name="T27">Outer OPS </text:span>Core </text:p>
      <text:p text:style-name="P49">- Auto-battle simulator logic</text:p>
      <text:p text:style-name="P49">- Team deployment system</text:p>
      <text:p text:style-name="P49">- Basic mission flow <text:span text:style-name="T27">(in a campaign, with retreat and support)</text:span></text:p>
      <text:p text:style-name="P49">- Reward and soldier state outcomes</text:p>
      <text:p text:style-name="P49"/>
      <text:p text:style-name="P49">### Phase 2: Mother Base Basics </text:p>
      <text:p text:style-name="P49">- Staff assignment system</text:p>
      <text:p text:style-name="P49">- GMP/resource gain + spend</text:p>
      <text:p text:style-name="P49">- UI for R&amp;D, Intel, Medical</text:p>
      <text:p text:style-name="P49"/>
      <text:p text:style-name="P49">### Phase <text:span text:style-name="T27">3</text:span>: Polish </text:p>
      <text:p text:style-name="P49">- Visual feedback, UI improvements</text:p>
      <text:p text:style-name="P49">- Animations, audio</text:p>
      <text:p text:style-name="P49">- Cutscene/comic-style narrative support</text:p>
      <text:p text:style-name="P49"/>
      <text:p text:style-name="P49"/>
      <text:p text:style-name="P50">### 5. Mockups</text:p>
      <text:p text:style-name="P50"/>
      <text:p text:style-name="P51">### 6. Plot</text:p>
      <text:p text:style-name="P51"/>
      <text:p text:style-name="P51">### 7. References</text:p>
      <text:p text:style-name="P51"/>
      <text:p text:style-name="P51">### 8. Player / Tester Feedbac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-W9500" svg:font-family="Ari-W9500" style:font-pitch="variable"/>
    <style:font-face style:name="Ari-W9500 Bold" svg:font-family="'Ari-W9500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3:12:42.255925400</meta:creation-date>
    <dc:date>2025-06-27T23:58:11.283713200</dc:date>
    <meta:editing-duration>P1DT4H30M39S</meta:editing-duration>
    <meta:editing-cycles>23</meta:editing-cycles>
    <meta:generator>LibreOffice/25.2.4.3$Windows_X86_64 LibreOffice_project/33e196637044ead23f5c3226cde09b47731f7e27</meta:generator>
    <meta:document-statistic meta:table-count="3" meta:image-count="0" meta:object-count="0" meta:page-count="7" meta:paragraph-count="127" meta:word-count="599" meta:character-count="3647" meta:non-whitespace-character-count="3165"/>
  </office:meta>
</office:document-meta>
</file>