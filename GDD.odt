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-W9500" svg:font-family="Ari-W9500" style:font-pitch="variable"/>
    <style:font-face style:name="Ari-W9500 Bold" svg:font-family="'Ari-W9500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6*"/>
    </style:style>
    <style:style style:name="Table1.C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-W9500 Bold" fo:font-size="22pt" fo:language="en" fo:country="US" fo:font-weight="bold" officeooo:rsid="000eec94" officeooo:paragraph-rsid="000eec94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-W9500 Bold" fo:font-size="22pt" fo:language="en" fo:country="US" officeooo:rsid="000eec94" officeooo:paragraph-rsid="000eec94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Ari-W9500 Bold" fo:font-size="22pt" fo:language="en" fo:country="US" fo:font-weight="bold" officeooo:rsid="000eec94" officeooo:paragraph-rsid="00104510" style:font-size-asian="22pt" style:font-weight-asian="bold" style:font-size-complex="22pt" style:font-weight-complex="bold"/>
    </style:style>
    <style:style style:name="P4" style:family="paragraph" style:parent-style-name="Standard">
      <style:paragraph-properties fo:break-before="page"/>
      <style:text-properties style:font-name="Ari-W9500 Bold" fo:font-size="18pt" fo:language="en" fo:country="US" officeooo:rsid="000eec94" officeooo:paragraph-rsid="000eec94" style:font-size-asian="18pt" style:font-size-complex="18pt"/>
    </style:style>
    <style:style style:name="P5" style:family="paragraph" style:parent-style-name="Table_20_Contents">
      <style:text-properties style:font-name="Ari-W9500 Bold" fo:font-size="16pt" fo:language="en" fo:country="US" officeooo:rsid="0013cd1f" officeooo:paragraph-rsid="0013cd1f" style:font-size-asian="16pt" style:font-size-complex="16pt"/>
    </style:style>
    <style:style style:name="P6" style:family="paragraph" style:parent-style-name="Table_20_Contents">
      <style:text-properties style:font-name="Ari-W9500" fo:font-size="16pt" fo:language="en" fo:country="US" officeooo:rsid="00104510" officeooo:paragraph-rsid="00104510" style:font-size-asian="16pt" style:font-size-complex="16pt"/>
    </style:style>
    <style:style style:name="P7" style:family="paragraph" style:parent-style-name="Table_20_Contents">
      <style:text-properties style:font-name="Ari-W9500" fo:font-size="16pt" fo:language="en" fo:country="US" officeooo:rsid="0013cd1f" officeooo:paragraph-rsid="0013cd1f" style:font-size-asian="16pt" style:font-size-complex="16pt"/>
    </style:style>
    <style:style style:name="P8" style:family="paragraph" style:parent-style-name="Table_20_Contents">
      <style:text-properties style:font-name="Ari-W9500" fo:font-size="16pt" fo:language="en" fo:country="US" style:font-size-asian="16pt" style:font-size-complex="16pt"/>
    </style:style>
    <style:style style:name="P9" style:family="paragraph" style:parent-style-name="Standard">
      <style:text-properties style:font-name="Ari-W9500" fo:language="en" fo:country="US" officeooo:rsid="000eec94" officeooo:paragraph-rsid="000eec94"/>
    </style:style>
    <style:style style:name="P10" style:family="paragraph" style:parent-style-name="Standard">
      <style:paragraph-properties fo:break-before="page"/>
      <style:text-properties style:font-name="Ari-W9500 Bold" fo:font-size="18pt" fo:language="en" fo:country="US" officeooo:rsid="00115e2d" officeooo:paragraph-rsid="00115e2d" style:font-size-asian="18pt" style:font-size-complex="18pt"/>
    </style:style>
    <style:style style:name="P11" style:family="paragraph" style:parent-style-name="Standard">
      <style:text-properties style:font-name="Ari-W9500 Bold" fo:font-size="16pt" fo:language="en" fo:country="US" officeooo:rsid="00115e2d" officeooo:paragraph-rsid="00115e2d" style:font-size-asian="14pt" style:font-size-complex="16pt"/>
    </style:style>
    <style:style style:name="P12" style:family="paragraph" style:parent-style-name="Standard">
      <style:text-properties style:font-name="Ari-W9500" fo:font-size="16pt" fo:language="en" fo:country="US" officeooo:rsid="00115e2d" officeooo:paragraph-rsid="00115e2d" style:font-size-asian="14pt" style:font-size-complex="16pt"/>
    </style:style>
    <style:style style:name="P13" style:family="paragraph" style:parent-style-name="Standard">
      <style:text-properties style:font-name="Ari-W9500 Bold" fo:font-size="16pt" fo:language="en" fo:country="US" officeooo:rsid="00115e2d" officeooo:paragraph-rsid="0013cd1f" style:font-size-asian="14pt" style:font-size-complex="16pt"/>
    </style:style>
    <style:style style:name="P14" style:family="paragraph" style:parent-style-name="Standard" style:list-style-name="L1">
      <style:text-properties style:font-name="Ari-W9500" fo:font-size="16pt" fo:language="en" fo:country="US" officeooo:rsid="00115e2d" officeooo:paragraph-rsid="0013cd1f" style:font-size-asian="14pt" style:font-size-complex="16pt"/>
    </style:style>
    <style:style style:name="P15" style:family="paragraph" style:parent-style-name="Standard" style:list-style-name="L1">
      <style:text-properties style:font-name="Ari-W9500" fo:font-size="16pt" fo:language="en" fo:country="US" officeooo:rsid="0013e0d5" officeooo:paragraph-rsid="0013e0d5" style:font-size-asian="14pt" style:font-size-complex="16pt"/>
    </style:style>
    <style:style style:name="P16" style:family="paragraph" style:parent-style-name="Standard">
      <style:text-properties style:font-name="Ari-W9500" fo:font-size="16pt" fo:language="en" fo:country="US" fo:font-weight="bold" officeooo:rsid="00115e2d" officeooo:paragraph-rsid="0018b7be" style:font-size-asian="14pt" style:font-weight-asian="bold" style:font-size-complex="16pt" style:font-weight-complex="bold"/>
    </style:style>
    <style:style style:name="P17" style:family="paragraph" style:parent-style-name="Standard">
      <style:text-properties style:font-name="Ari-W9500" fo:font-size="16pt" fo:language="en" fo:country="US" officeooo:rsid="00115e2d" officeooo:paragraph-rsid="0018b7be" style:font-size-asian="14pt" style:font-size-complex="16pt"/>
    </style:style>
    <style:style style:name="P18" style:family="paragraph" style:parent-style-name="Standard">
      <style:text-properties style:font-name="Ari-W9500" fo:font-size="16pt" fo:language="en" fo:country="US" officeooo:rsid="00115e2d" officeooo:paragraph-rsid="00191954" style:font-size-asian="14pt" style:font-size-complex="16pt"/>
    </style:style>
    <style:style style:name="P19" style:family="paragraph" style:parent-style-name="Standard">
      <style:text-properties style:font-name="Ari-W9500" fo:font-size="16pt" fo:language="en" fo:country="US" officeooo:rsid="00115e2d" officeooo:paragraph-rsid="001b61fb" style:font-size-asian="14pt" style:font-size-complex="16pt"/>
    </style:style>
    <style:style style:name="P20" style:family="paragraph" style:parent-style-name="Standard">
      <style:text-properties style:font-name="Ari-W9500" fo:font-size="16pt" fo:language="en" fo:country="US" officeooo:rsid="00115e2d" officeooo:paragraph-rsid="001986c5" style:font-size-asian="14pt" style:font-size-complex="16pt"/>
    </style:style>
    <style:style style:name="P21" style:family="paragraph" style:parent-style-name="Standard">
      <style:text-properties style:font-name="Ari-W9500" fo:font-size="16pt" fo:language="en" fo:country="US" officeooo:rsid="001b61fb" officeooo:paragraph-rsid="001b61fb" style:font-size-asian="14pt" style:font-size-complex="16pt"/>
    </style:style>
    <style:style style:name="P22" style:family="paragraph" style:parent-style-name="Standard">
      <style:text-properties style:font-name="Ari-W9500 Bold" fo:font-size="16pt" fo:language="en" fo:country="US" officeooo:rsid="00115e2d" officeooo:paragraph-rsid="001b61fb" style:font-size-asian="14pt" style:font-size-complex="16pt"/>
    </style:style>
    <style:style style:name="P23" style:family="paragraph" style:parent-style-name="Standard">
      <style:text-properties style:font-name="Ari-W9500" fo:font-size="16pt" fo:language="en" fo:country="US" officeooo:rsid="00115e2d" officeooo:paragraph-rsid="001cee3a" style:font-size-asian="14pt" style:font-size-complex="16pt"/>
    </style:style>
    <style:style style:name="P24" style:family="paragraph" style:parent-style-name="Standard">
      <style:text-properties style:font-name="Ari-W9500" fo:font-size="16pt" fo:language="en" fo:country="US" officeooo:rsid="00115e2d" officeooo:paragraph-rsid="001e651f" style:font-size-asian="14pt" style:font-size-complex="16pt"/>
    </style:style>
    <style:style style:name="P25" style:family="paragraph" style:parent-style-name="Standard">
      <style:text-properties style:font-name="Ari-W9500" fo:font-size="16pt" fo:language="pt" fo:country="BR" officeooo:rsid="001e651f" officeooo:paragraph-rsid="001e651f" style:font-size-asian="14pt" style:font-size-complex="16pt"/>
    </style:style>
    <style:style style:name="P26" style:family="paragraph" style:parent-style-name="Standard">
      <style:text-properties style:font-name="Ari-W9500" fo:font-size="16pt" fo:language="pt" fo:country="BR" officeooo:rsid="001f4ef5" officeooo:paragraph-rsid="001f4ef5" style:font-size-asian="14pt" style:font-size-complex="16pt"/>
    </style:style>
    <style:style style:name="T1" style:family="text">
      <style:text-properties officeooo:rsid="0013cd1f"/>
    </style:style>
    <style:style style:name="T2" style:family="text">
      <style:text-properties officeooo:rsid="0018b7be"/>
    </style:style>
    <style:style style:name="T3" style:family="text">
      <style:text-properties style:font-name="Ari-W9500 Bold"/>
    </style:style>
    <style:style style:name="T4" style:family="text">
      <style:text-properties fo:color="#81d41a" loext:opacity="100%" fo:font-weight="bold" officeooo:rsid="0013cd1f" style:font-weight-asian="bold" style:font-weight-complex="bold"/>
    </style:style>
    <style:style style:name="T5" style:family="text">
      <style:text-properties fo:color="#81d41a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1d41a" loext:opacity="100%"/>
    </style:style>
    <style:style style:name="T8" style:family="text">
      <style:text-properties officeooo:rsid="0013e0d5"/>
    </style:style>
    <style:style style:name="T9" style:family="text">
      <style:text-properties fo:font-weight="bold" officeooo:rsid="0018b7be" style:font-weight-asian="bold" style:font-weight-complex="bold"/>
    </style:style>
    <style:style style:name="T10" style:family="text">
      <style:text-properties officeooo:rsid="00191954"/>
    </style:style>
    <style:style style:name="T11" style:family="text">
      <style:text-properties officeooo:rsid="001986c5"/>
    </style:style>
    <style:style style:name="T12" style:family="text">
      <style:text-properties officeooo:rsid="001b61fb"/>
    </style:style>
    <style:style style:name="T13" style:family="text">
      <style:text-properties fo:language="pt" fo:country="BR"/>
    </style:style>
    <style:style style:name="T14" style:family="text">
      <style:text-properties fo:language="pt" fo:country="BR" officeooo:rsid="001b61fb"/>
    </style:style>
    <style:style style:name="T15" style:family="text">
      <style:text-properties fo:language="pt" fo:country="BR" officeooo:rsid="001cee3a"/>
    </style:style>
    <style:style style:name="T16" style:family="text">
      <style:text-properties style:font-name="Ari-W9500 Bold" fo:language="pt" fo:country="BR" officeooo:rsid="001e651f"/>
    </style:style>
    <style:style style:name="T17" style:family="text">
      <style:text-properties fo:language="pt" fo:country="BR" officeooo:rsid="001e651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Design Document</text:p>
      <text:p text:style-name="P1">Outer OPS DEMO</text:p>
      <text:p text:style-name="P1">v1.1.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Noro</text:p>
      <text:p text:style-name="P1">06/2025</text:p>
      <text:p text:style-name="P4">Version Control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ersion Number</text:p>
          </table:table-cell>
          <table:table-cell table:style-name="Table1.A1" office:value-type="string">
            <text:p text:style-name="P5">Info</text:p>
          </table:table-cell>
          <table:table-cell table:style-name="Table1.C1" office:value-type="string">
            <text:p text:style-name="P5">Date</text:p>
          </table:table-cell>
        </table:table-row>
        <table:table-row>
          <table:table-cell table:style-name="Table1.A2" office:value-type="string">
            <text:p text:style-name="P6">V1.1.0</text:p>
          </table:table-cell>
          <table:table-cell table:style-name="Table1.A2" office:value-type="string">
            <text:p text:style-name="P6">Ini<text:span text:style-name="T1">tial version, first thoughts </text:span><text:span text:style-name="T2">and concepts put on this document</text:span><text:span text:style-name="T1">, simplest mockup in GODOT </text:span><text:span text:style-name="T2">developed</text:span></text:p>
          </table:table-cell>
          <table:table-cell table:style-name="Table1.C2" office:value-type="string">
            <text:p text:style-name="P7">26 – 06 – 2025 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9"/>
      <text:p text:style-name="P9"/>
      <text:p text:style-name="P9"/>
      <text:p text:style-name="P10">Overview</text:p>
      <text:p text:style-name="P11"/>
      <text:p text:style-name="P12"><text:span text:style-name="T1">Outer OPS (temporary title) is a</text:span> tactical stealth-action game inspired by <text:span text:style-name="T3">*Metal Gear Solid: Peace Walker* </text:span><text:span text:style-name="T1">OUTER OPS segment</text:span>, combining <text:span text:style-name="T1">varied </text:span><text:span text:style-name="T4">auto-battle</text:span><text:span text:style-name="T5"> missions</text:span><text:span text:style-name="T6"> </text:span>and a <text:span text:style-name="T5">meta-management system</text:span> involving a <text:span text:style-name="T5">customizable Mother Base</text:span>. Players will<text:span text:style-name="T7"> </text:span><text:span text:style-name="T5">capture and recruit enemies, develop weapons, assign staff, and launch Outer Ops combat deployments</text:span><text:span text:style-name="T6">. </text:span></text:p>
      <text:p text:style-name="P12"/>
      <text:p text:style-name="P12"/>
      <text:p text:style-name="P13">## 1. Core Game Loop </text:p>
      <text:list text:style-name="L1">
        <text:list-item>
          <text:p text:style-name="P14">Choose/Develop Equipment / <text:span text:style-name="T1">Assign Staff / Recruit </text:span><text:span text:style-name="T8">Troops</text:span></text:p>
        </text:list-item>
        <text:list-item>
          <text:p text:style-name="P14">Select <text:span text:style-name="T8">Campaign → Mission</text:span></text:p>
        </text:list-item>
        <text:list-item>
          <text:p text:style-name="P14">Complete Mission</text:p>
        </text:list-item>
        <text:list-item>
          <text:p text:style-name="P15">Gain Resources / Staff / Intel</text:p>
        </text:list-item>
        <text:list-item>
          <text:p text:style-name="P14">Assign new staff to base departments</text:p>
        </text:list-item>
        <text:list-item>
          <text:p text:style-name="P14">Develop new gear or send staff to Outer Ops</text:p>
        </text:list-item>
        <text:list-item>
          <text:p text:style-name="P14"><text:s/>Repeat </text:p>
        </text:list-item>
      </text:list>
      <text:p text:style-name="P12"/>
      <text:p text:style-name="P11">## 2. Modules Breakdown </text:p>
      <text:p text:style-name="P11"/>
      <text:p text:style-name="P16">### <text:span text:style-name="T2">A</text:span>. Mother Base Management </text:p>
      <text:p text:style-name="P17">- Base view: departments like R&amp;D, Mess Hall, Intel, etc.</text:p>
      <text:p text:style-name="P17">- Staff stat system (Combat, Intel, Tech, Medical, Morale)</text:p>
      <text:p text:style-name="P17">- Staff assignment interface</text:p>
      <text:p text:style-name="P17">- Time-based <text:span text:style-name="T2">and </text:span>or trigger-based gear development</text:p>
      <text:p text:style-name="P17">- GMP and resource currency</text:p>
      <text:p text:style-name="P17"/>
      <text:p text:style-name="P18"><text:span text:style-name="T6">### </text:span><text:span text:style-name="T9">B</text:span><text:span text:style-name="T6">. Outer Ops (Auto-Battler)</text:span> </text:p>
      <text:p text:style-name="P18">- <text:span text:style-name="T10">Choose Campaign that you want to partake (or continue)</text:span></text:p>
      <text:p text:style-name="P18">- Deploy staff teams to missions</text:p>
      <text:p text:style-name="P18">- Enemy force preview with difficulty rating</text:p>
      <text:p text:style-name="P19">- Auto-simulated battle using stats + RNG</text:p>
      <text:p text:style-name="P19">- Soldier outcomes (promotion, injury, death)</text:p>
      <text:p text:style-name="P18">- Loot and rewards system</text:p>
      <text:p text:style-name="P18"><text:soft-page-break/>- <text:span text:style-name="T10">Retreat or proceed after battle</text:span></text:p>
      <text:p text:style-name="P18"/>
      <text:p text:style-name="P20">### <text:span text:style-name="T11">C</text:span>. Progression </text:p>
      <text:p text:style-name="P20">- Soldier recruitment</text:p>
      <text:p text:style-name="P20">- Base expansion (leveling up departments)</text:p>
      <text:p text:style-name="P20">- Unlock new missions</text:p>
      <text:p text:style-name="P20">- Blueprint system for gear</text:p>
      <text:p text:style-name="P20"/>
      <text:p text:style-name="P19">### <text:span text:style-name="T11">D</text:span>. UI and Menus </text:p>
      <text:p text:style-name="P19">- Main menu with Mission/Outer Ops/Base</text:p>
      <text:p text:style-name="P19">- <text:span text:style-name="T12">Campaign</text:span> selection with objective preview <text:span text:style-name="T12">( Campaign → Mission)</text:span></text:p>
      <text:p text:style-name="P21">- Mission menu with current objective and management options</text:p>
      <text:p text:style-name="P21">- R&amp;D menu with Weapons / Items / <text:span text:style-name="T13">Mechs</text:span></text:p>
      <text:p text:style-name="P21">- <text:span text:style-name="T13">Recruitment Menu</text:span></text:p>
      <text:p text:style-name="P19">- Staff list and sorting</text:p>
      <text:p text:style-name="P19">- Equipment loadout screen</text:p>
      <text:p text:style-name="P19">- <text:span text:style-name="T14">Battle Interface (Combat / Stealth )</text:span></text:p>
      <text:p text:style-name="P19">- Mission result screen (rank, rewards)</text:p>
      <text:p text:style-name="P19"/>
      <text:p text:style-name="P22">## 3. Data Models (simplified) </text:p>
      <text:p text:style-name="P22"/>
      <text:p text:style-name="P19">### <text:span text:style-name="T7">Soldier</text:span> </text:p>
      <text:p text:style-name="P23">- ID, name, stats (combat, tech, etc.)</text:p>
      <text:p text:style-name="P23">- Condition (healthy, injured, dead)</text:p>
      <text:p text:style-name="P23">- Department assignment</text:p>
      <text:p text:style-name="P23">- Experience/Rank</text:p>
      <text:p text:style-name="P23"/>
      <text:p text:style-name="P23">### <text:span text:style-name="T15">Campaign</text:span></text:p>
      <text:p text:style-name="P23">- ID, name, map, objective</text:p>
      <text:p text:style-name="P23">- Enemy stats, patrols</text:p>
      <text:p text:style-name="P23">- Rewards</text:p>
      <text:p text:style-name="P23">- Rank calculation formula</text:p>
      <text:p text:style-name="P23"/>
      <text:p text:style-name="P23">### Outer Ops Mission </text:p>
      <text:p text:style-name="P23">- ID, enemy force stats</text:p>
      <text:p text:style-name="P23"><text:soft-page-break/>- Estimated difficulty</text:p>
      <text:p text:style-name="P23">- Rewards table</text:p>
      <text:p text:style-name="P23">- Duration (for delayed simulation)</text:p>
      <text:p text:style-name="P23"/>
      <text:p text:style-name="P24"><text:span text:style-name="T3">## </text:span><text:span text:style-name="T16">4</text:span><text:span text:style-name="T3">. Prototype Roadmap</text:span> </text:p>
      <text:p text:style-name="P24"/>
      <text:p text:style-name="P24">### Phase 1: <text:span text:style-name="T17">Outer OPS </text:span>Core </text:p>
      <text:p text:style-name="P24">- Auto-battle simulator logic</text:p>
      <text:p text:style-name="P24">- Team deployment system</text:p>
      <text:p text:style-name="P24">- Basic mission flow <text:span text:style-name="T17">(in a campaign, with retreat and support)</text:span></text:p>
      <text:p text:style-name="P24">- Reward and soldier state outcomes</text:p>
      <text:p text:style-name="P24"/>
      <text:p text:style-name="P24">### Phase 2: Mother Base Basics </text:p>
      <text:p text:style-name="P24">- Staff assignment system</text:p>
      <text:p text:style-name="P24">- GMP/resource gain + spend</text:p>
      <text:p text:style-name="P24">- UI for R&amp;D, Intel, Medical</text:p>
      <text:p text:style-name="P24"/>
      <text:p text:style-name="P24">### Phase <text:span text:style-name="T17">3</text:span>: Polish </text:p>
      <text:p text:style-name="P24">- Visual feedback, UI improvements</text:p>
      <text:p text:style-name="P24">- Animations, audio</text:p>
      <text:p text:style-name="P24">- Cutscene/comic-style narrative support</text:p>
      <text:p text:style-name="P24"/>
      <text:p text:style-name="P24"/>
      <text:p text:style-name="P25">### 5. Mockups</text:p>
      <text:p text:style-name="P25"/>
      <text:p text:style-name="P26">### 6. Plot</text:p>
      <text:p text:style-name="P26"/>
      <text:p text:style-name="P26">### 7. References</text:p>
      <text:p text:style-name="P26"/>
      <text:p text:style-name="P26">### 8. Player / Tester Feedbac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-W9500" svg:font-family="Ari-W9500" style:font-pitch="variable"/>
    <style:font-face style:name="Ari-W9500 Bold" svg:font-family="'Ari-W9500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13:12:42.255925400</meta:creation-date>
    <dc:date>2025-06-26T21:25:15.237676500</dc:date>
    <meta:editing-duration>PT2H18M39S</meta:editing-duration>
    <meta:editing-cycles>12</meta:editing-cycles>
    <meta:generator>LibreOffice/25.2.4.3$Windows_X86_64 LibreOffice_project/33e196637044ead23f5c3226cde09b47731f7e27</meta:generator>
    <meta:document-statistic meta:table-count="1" meta:image-count="0" meta:object-count="0" meta:page-count="5" meta:paragraph-count="86" meta:word-count="460" meta:character-count="2762" meta:non-whitespace-character-count="2376"/>
  </office:meta>
</office:document-meta>
</file>